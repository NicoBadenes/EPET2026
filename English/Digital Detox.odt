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3d166"/>
    </style:style>
    <style:style style:name="P2" style:family="paragraph" style:parent-style-name="Standard">
      <style:text-properties fo:font-weight="bold" officeooo:paragraph-rsid="0013d166" style:font-weight-asian="bold" style:font-weight-complex="bold"/>
    </style:style>
    <style:style style:name="P3" style:family="paragraph" style:parent-style-name="Standard">
      <style:text-properties fo:font-weight="bold" officeooo:rsid="0013d166" officeooo:paragraph-rsid="0013d166" style:font-weight-asian="bold" style:font-weight-complex="bold"/>
    </style:style>
    <style:style style:name="P4" style:family="paragraph" style:parent-style-name="Standard">
      <style:text-properties fo:font-weight="bold" officeooo:rsid="00135669" officeooo:paragraph-rsid="00135669" style:font-weight-asian="bold" style:font-weight-complex="bold"/>
    </style:style>
    <style:style style:name="P5" style:family="paragraph" style:parent-style-name="Standard">
      <style:text-properties fo:font-weight="normal" officeooo:rsid="0013d166" officeooo:paragraph-rsid="00135669" style:font-weight-asian="normal" style:font-weight-complex="normal"/>
    </style:style>
    <style:style style:name="P6" style:family="paragraph" style:parent-style-name="Standard">
      <style:text-properties fo:font-weight="normal" officeooo:rsid="0013d166" officeooo:paragraph-rsid="0013d166" style:font-weight-asian="normal" style:font-weight-complex="normal"/>
    </style:style>
    <style:style style:name="P7" style:family="paragraph" style:parent-style-name="Standard">
      <style:text-properties officeooo:rsid="00135669" officeooo:paragraph-rsid="00135669"/>
    </style:style>
    <style:style style:name="T1" style:family="text">
      <style:text-properties fo:font-weight="bold" officeooo:rsid="0013d166" style:font-weight-asian="bold" style:font-weight-complex="bold"/>
    </style:style>
    <style:style style:name="T2" style:family="text">
      <style:text-properties officeooo:rsid="0013d166"/>
    </style:style>
    <style:style style:name="T3" style:family="text">
      <style:text-properties fo:font-weight="normal" officeooo:rsid="0013d16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vices:<text:line-break/></text:span><text:span text:style-name="T2">- Laptop</text:span></text:p>
      <text:p text:style-name="P1">- <text:span text:style-name="T2">Smartphone</text:span></text:p>
      <text:p text:style-name="P1">- <text:span text:style-name="T2">monitor</text:span></text:p>
      <text:p text:style-name="P2"/>
      <text:p text:style-name="P3">Things a device does to get your attention:</text:p>
      <text:p text:style-name="P4">- <text:span text:style-name="T3">Show an alert</text:span></text:p>
      <text:p text:style-name="P5">- Buzz</text:p>
      <text:p text:style-name="P5">- Show a notification</text:p>
      <text:p text:style-name="P5"/>
      <text:p text:style-name="P3">Things you do with a device</text:p>
      <text:p text:style-name="P6">- Browse websites</text:p>
      <text:p text:style-name="P6">- Access the internet</text:p>
      <text:p text:style-name="P6">- Satnav</text:p>
      <text:p text:style-name="P6"/>
      <text:p text:style-name="P3">Parts of a device</text:p>
      <text:p text:style-name="P6">- Screen</text:p>
      <text:p text:style-name="P6">- Display</text:p>
      <text:p text:style-name="P6"/>
      <text:p text:style-name="P6">----------------------------------------------------------------------------------------------------------------------------</text:p>
      <text:p text:style-name="P3">Task 1:</text:p>
      <text:p text:style-name="P7">1. b.</text:p>
      <text:p text:style-name="P7">2. c.</text:p>
      <text:p text:style-name="P7">3. a.</text:p>
      <text:p text:style-name="P7">4. a.</text:p>
      <text:p text:style-name="P7">5. b.</text:p>
      <text:p text:style-name="P7">6. b.</text:p>
      <text:p text:style-name="P7">7. a.</text:p>
      <text:p text:style-name="P7">8. c.</text:p>
      <text:p text:style-name="P7"/>
      <text:p text:style-name="P3">Task 2:</text:p>
      <text:p text:style-name="P6">1. Have you ever wondered what would be like?</text:p>
      <text:p text:style-name="P6">2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4T20:04:24.347215537</meta:creation-date>
    <dc:date>2026-05-14T20:25:41.474149461</dc:date>
    <meta:editing-duration>PT10M38S</meta:editing-duration>
    <meta:editing-cycles>1</meta:editing-cycles>
    <meta:document-statistic meta:table-count="0" meta:image-count="0" meta:object-count="0" meta:page-count="1" meta:paragraph-count="27" meta:word-count="79" meta:character-count="456" meta:non-whitespace-character-count="403"/>
    <meta:generator>LibreOffice/25.8.6.2$Linux_X86_64 LibreOffice_project/580$Build-2</meta:generator>
  </office:meta>
</office:document-meta>
</file>