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7acc5"/>
    </style:style>
    <style:style style:name="T2" style:family="text">
      <style:text-properties officeooo:rsid="0018da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o: <text:span text:style-name="T1">Ms. Landradoy</text:span><text:line-break/>From: <text:span text:style-name="T1">Nicolás Badenes</text:span><text:line-break/>Subject: Benjamin Kellett Visit<text:line-break/>Date: May 27th, 2026</text:p>
      <text:p text:style-name="Text_20_body">Introduction:<text:line-break/>As requested, I have done some research about Benjamin Kellett and his work in paragliding. My findings are outlined below.</text:p>
      <text:p text:style-name="Text_20_body">Description:<text:line-break/>Benjamin Kellett is a professional paraglider pilot originally from the United Kingdom. He spends most of his time between New Zealand and the European Alps, where he works as a tandem paraglider pilot and adventure content creator. He has more than ten years of experience flying in mountains and remote locations around the world. (<text:a xlink:type="simple" xlink:href="https://www.benjaminkellett.com/about?utm_source=chatgpt.com" text:style-name="Internet_20_link" text:visited-style-name="Visited_20_Internet_20_Link">benjaminkellett.com</text:a>)</text:p>
      <text:p text:style-name="Text_20_body">Experience and Achievements:<text:line-break/>Kellett is known for long-distance paragliding flights and “vol-biv” adventures, where pilots fly with camping equipment and stay<text:span text:style-name="T2">s</text:span> in remote mountain areas. He has flown in places such as the Himalayas, Pakistan, New Zealand, and the Alps. He is also the current New Zealand cross-country paragliding champion and has won the Wanaka Hike &amp; Fly competition twice.</text:p>
      <text:p text:style-name="Text_20_body">Recently, one of his flights became viral after he fle<text:span text:style-name="T2">w</text:span> 200 kilometers over the Himalayas in India. The flight lasted more than six hours and showed impressive mountain landscapes filmed with GoPro camera.</text:p>
      <text:p text:style-name="Text_20_body">Why He Should Visit the School:<text:line-break/>Benjamin Kellett could give students an interesting presentation about paragliding, adventure sports, and outdoor safety. He could explain how paragliding works, the importance of weather conditions, decision-making, and physical preparation. He could also share stories and videos from his expeditions to inspire students to learn about nature, travel, and extreme sports.</text:p>
      <text:p text:style-name="Text_20_body">Conclusion:<text:line-break/>Benjamin Kellett is an experienced and inspiring paraglider pilot who combines adventure, travel, and outdoor exploration. A visit from him would be educational and entertaining for students, while also teaching important lessons about discipline, preparation, and following personal goal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7T18:26:59.374123745</meta:creation-date>
    <dc:date>2026-05-27T19:09:10.656719384</dc:date>
    <meta:editing-duration>PT42M10S</meta:editing-duration>
    <meta:editing-cycles>3</meta:editing-cycles>
    <meta:generator>LibreOffice/25.8.6.2$Linux_X86_64 LibreOffice_project/580$Build-2</meta:generator>
    <meta:document-statistic meta:table-count="0" meta:image-count="0" meta:object-count="0" meta:page-count="1" meta:paragraph-count="7" meta:word-count="281" meta:character-count="1899" meta:non-whitespace-character-count="1625"/>
  </office:meta>
</office:document-meta>
</file>