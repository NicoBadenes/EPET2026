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b95" officeooo:paragraph-rsid="001f8b95"/>
    </style:style>
    <style:style style:name="T1" style:family="text">
      <style:text-properties fo:font-weight="bold" style:font-weight-asian="bold" style:font-weight-complex="bold"/>
    </style:style>
    <style:style style:name="T2" style:family="text">
      <style:text-properties officeooo:rsid="0020963f"/>
    </style:style>
    <style:style style:name="T3"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text:span> Ms. <text:span text:style-name="T2">Montiveros</text:span></text:p>
      <text:p text:style-name="P1"><text:span text:style-name="T1">From:</text:span> Nicolás Badenes</text:p>
      <text:p text:style-name="P1"><text:span text:style-name="T1">Subject:</text:span> Report on Nomophobia</text:p>
      <text:p text:style-name="P1"><text:span text:style-name="T1">Date:</text:span> June 3<text:span text:style-name="T3">rd</text:span>, 2026</text:p>
      <text:p text:style-name="P1"/>
      <text:p text:style-name="P1"><text:span text:style-name="T1">Introduction</text:span>: The aim of this report is to present information about nomophobia, covering its definition, symptoms, and causes.</text:p>
      <text:p text:style-name="P1"/>
      <text:p text:style-name="P1"><text:span text:style-name="T1">Definition:</text:span> Nomophobia is an abbreviation for “no mobile phone phobia”. It is defined as the irrational fear of losing or not having access to your cellphone. This fear can be triggered by losing your signal, running out o battery, or simply losing sight of your phone.</text:p>
      <text:p text:style-name="P1"/>
      <text:p text:style-name="P1"><text:span text:style-name="T1">Symptoms: </text:span>There are several warning signs connected to this condition. People often suffer from withdrawal symptoms when their network is unreachable. Additionally, they can experience anxiety and feel stressed when their phone battery drops into de red zone. Other common symptoms include disturbed sleep, which reduces cognitive and learning skills, and even putting your life at risk just to check the device.</text:p>
      <text:p text:style-name="P1"/>
      <text:p text:style-name="P1"><text:span text:style-name="T1">Causes:</text:span> The main reason behind this fear is that people totally rely on their phones at home and at work. We store a large amount of confidential information on our devices, including contact details, photos, and bank logins. Consequently, people are afraid of losing their smartphones for a logical reason, very much like the fear of losing their key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3T15:23:54.733120587</meta:creation-date>
    <dc:date>2026-06-03T15:32:43.446730809</dc:date>
    <meta:editing-duration>PT8M48S</meta:editing-duration>
    <meta:editing-cycles>2</meta:editing-cycles>
    <meta:generator>LibreOffice/25.8.7.3$Linux_X86_64 LibreOffice_project/580$Build-3</meta:generator>
    <meta:document-statistic meta:table-count="0" meta:image-count="0" meta:object-count="0" meta:page-count="1" meta:paragraph-count="8" meta:word-count="199" meta:character-count="1249" meta:non-whitespace-character-count="1058"/>
  </office:meta>
</office:document-meta>
</file>