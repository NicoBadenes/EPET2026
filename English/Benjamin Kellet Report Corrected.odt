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 officeooo:rsid="000bc547" officeooo:paragraph-rsid="000bc547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officeooo:paragraph-rsid="000bc547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 officeooo:rsid="000bc547" officeooo:paragraph-rsid="000bc547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officeooo:paragraph-rsid="0009f4f0"/>
    </style:style>
    <style:style style:name="P6" style:family="paragraph" style:parent-style-name="Standard">
      <style:text-properties style:font-name="Liberation Serif"/>
    </style:style>
    <style:style style:name="T1" style:family="text">
      <style:text-properties officeooo:rsid="000bc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jamin Kellett's visit to our school</text:p>
      <text:p text:style-name="P2">Introduction</text:p>
      <text:p text:style-name="P3">The aims of this report are to make suggestions for a suitable activity to do with the professional paraglider Benjamin Kellett when he visits our school and to recommend a present to give him. It is based on a survey of <text:span text:style-name="T1">120</text:span> students.</text:p>
      <text:p text:style-name="P4">Activity with Benjamin Kellet</text:p>
      <text:p text:style-name="P5">The majority of people surveyed thought that the best way for our students to have contact with the pilot was to organise a presentation in the school hall. Kellett could be on the stage showing videos of his 200-kilometer flight over the Himalayas, and students could ask him questions about adventure sports.</text:p>
      <text:p text:style-name="P4">A suitable present</text:p>
      <text:p text:style-name="P5">Most students thought that the school could use the 3D printer to create a topographical map of the European Alps. This custom model would represent the remote mountain areas where he frequently flies and works, serving as a unique item to thank Kellett for his visit.</text:p>
      <text:p text:style-name="P4">Recommendations</text:p>
      <text:p text:style-name="P5">I would recommend that we organise a presentation with Kellett in the main hall. All students would like to attend and representatives from each class could ask him a question. Perhaps we could also consider presenting him with the 3D-printed map of the Alps as a thank-you present.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3T15:05:44.865224991</meta:creation-date>
    <dc:date>2026-06-03T20:23:48.407920337</dc:date>
    <meta:editing-duration>PT3M31S</meta:editing-duration>
    <meta:editing-cycles>2</meta:editing-cycles>
    <meta:generator>LibreOffice/25.8.7.3$Linux_X86_64 LibreOffice_project/580$Build-3</meta:generator>
    <meta:document-statistic meta:table-count="0" meta:image-count="0" meta:object-count="0" meta:page-count="1" meta:paragraph-count="9" meta:word-count="204" meta:character-count="1207" meta:non-whitespace-character-count="1011"/>
  </office:meta>
</office:document-meta>
</file>