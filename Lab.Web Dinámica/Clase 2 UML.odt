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2164" officeooo:paragraph-rsid="001f216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f2164" officeooo:paragraph-rsid="001f2164"/>
    </style:style>
    <style:style style:name="P3" style:family="paragraph" style:parent-style-name="Standard">
      <style:text-properties officeooo:rsid="001f2b78" officeooo:paragraph-rsid="001f2b78"/>
    </style:style>
    <style:style style:name="P4" style:family="paragraph" style:parent-style-name="Standard">
      <style:text-properties officeooo:rsid="00207433" officeooo:paragraph-rsid="002074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2b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diagrama:</text:p>
      <text:p text:style-name="P1"/>
      <text:p text:style-name="P2"><text:span text:style-name="T1">Estructurales-&gt;</text:span> Cómo está armado el sistema</text:p>
      <text:p text:style-name="P2"/>
      <text:p text:style-name="P2"><text:tab/>1<text:span text:style-name="T1">.</text:span> De clases &gt; <text:span text:style-name="T2">Representan las clases de un sistema y las relaciones entre ellas</text:span></text:p>
      <text:p text:style-name="P2"><text:tab/><text:span text:style-name="T1">2.</text:span> De objetos &gt; <text:span text:style-name="T2">Muestran la organización y la dependecias entre … ?¡ … del software</text:span></text:p>
      <text:p text:style-name="P2"><text:tab/><text:span text:style-name="T1">3.</text:span> De componentes &gt; <text:span text:style-name="T2">Muestran la organización y la dependencia entre los componentes del software</text:span></text:p>
      <text:p text:style-name="P2"><text:tab/><text:span text:style-name="T1">4.</text:span> De paquetes &gt; </text:p>
      <text:p text:style-name="P2"><text:tab/><text:span text:style-name="T1">5.</text:span> De despliegue</text:p>
      <text:p text:style-name="P2"/>
      <text:p text:style-name="P2"><text:span text:style-name="T1">Comportamiento-&gt;</text:span> Cómo funciona el sistema en el tiempo</text:p>
      <text:p text:style-name="P2"/>
      <text:p text:style-name="P2"><text:tab/><text:span text:style-name="T1">1.</text:span> Casos de uso &gt; <text:span text:style-name="T2">Describen las interacciónes entre el sistema y los actores de uso </text:span></text:p>
      <text:p text:style-name="P2"><text:tab/><text:span text:style-name="T1">2.</text:span> De secuencia &gt; <text:span text:style-name="T2">Muestran como los objetos interactúan en un escenario en una secuencia de tiempo</text:span></text:p>
      <text:p text:style-name="P2"><text:tab/><text:span text:style-name="T1">3.</text:span> De actividades &gt; </text:p>
      <text:p text:style-name="P2"><text:tab/><text:span text:style-name="T1">4.</text:span> De estados</text:p>
      <text:p text:style-name="P2"><text:span text:style-name="T1"><text:tab/>5.</text:span> De comunicación</text:p>
      <text:p text:style-name="P2"/>
      <text:p text:style-name="P3">+ 3 videos</text:p>
      <text:p text:style-name="P3">1°er video: Diagramas estructurales y de comportamiento (past info) </text:p>
      <text:p text:style-name="P3">2°do video: Como abordar un diagrama de clases UML?:</text:p>
      <text:p text:style-name="P4">3°er video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4:09:31.285095148</meta:creation-date>
    <dc:date>2026-03-31T18:18:57.836895752</dc:date>
    <meta:editing-duration>PT2H42M44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1" meta:paragraph-count="17" meta:word-count="136" meta:character-count="792" meta:non-whitespace-character-count="658"/>
  </office:meta>
</office:document-meta>
</file>