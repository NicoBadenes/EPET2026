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467" officeooo:paragraph-rsid="001fa4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1:<text:line-break/><text:line-break/><text:tab/><text:tab/>MOV<text:tab/><text:tab/>R0, #5</text:p>
      <text:p text:style-name="P1"><text:tab/><text:tab/>MOV<text:tab/><text:tab/>R1, #5</text:p>
      <text:p text:style-name="P1"><text:tab/><text:tab/></text:p>
      <text:p text:style-name="P1"><text:tab/><text:tab/>ADD<text:tab/><text:tab/>R2, R0, R1<text:line-break/><text:line-break/>Ej2:<text:line-break/><text:line-break/><text:tab/><text:tab/>MOV<text:tab/><text:tab/>R0, #5</text:p>
      <text:p text:style-name="P1"><text:tab/><text:tab/>CMP<text:tab/><text:tab/>R0, #0</text:p>
      <text:p text:style-name="P1"><text:tab/><text:tab/></text:p>
      <text:p text:style-name="P1"><text:tab/><text:tab/>RSBLT<text:tab/>R0, R0, #0</text:p>
      <text:p text:style-name="P1"><text:tab/></text:p>
      <text:p text:style-name="P1">Ej3:<text:line-break/></text:p>
      <text:p text:style-name="P1"><text:tab/><text:tab/>MOV<text:tab/><text:tab/>R0, #0</text:p>
      <text:p text:style-name="P1"><text:tab/><text:tab/>MOV<text:tab/><text:tab/>R1, #1</text:p>
      <text:p text:style-name="P1"><text:tab/><text:tab/>CMP<text:tab/><text:tab/>R0, #100</text:p>
      <text:p text:style-name="P1">empanada</text:p>
      <text:p text:style-name="P1"><text:tab/><text:tab/>ADD<text:tab/><text:tab/>R0, R0, R1</text:p>
      <text:p text:style-name="P1"><text:tab/><text:tab/>CMP<text:tab/><text:tab/>R0, #100</text:p>
      <text:p text:style-name="P1"><text:tab/><text:tab/>BLT<text:tab/><text:tab/>empanada</text:p>
      <text:p text:style-name="P1"/>
      <text:p text:style-name="P1">Ej4:<text:line-break/><text:line-break/><text:tab/><text:tab/><text:tab/>MOV<text:tab/><text:tab/>R0, #99</text:p>
      <text:p text:style-name="P1"><text:tab/><text:tab/><text:tab/>MOV<text:tab/><text:tab/>R1, #64</text:p>
      <text:p text:style-name="P1">cuatroquesos</text:p>
      <text:p text:style-name="P1"><text:tab/><text:tab/><text:tab/>ADD<text:tab/><text:tab/>R2, R0, R1</text:p>
      <text:p text:style-name="P1"><text:tab/><text:tab/><text:tab/>CMP<text:tab/><text:tab/>R2, #100</text:p>
      <text:p text:style-name="P1"><text:tab/><text:tab/><text:tab/></text:p>
      <text:p text:style-name="P1"><text:tab/><text:tab/><text:tab/>MOVLS<text:tab/>R0, R2</text:p>
      <text:p text:style-name="P1"><text:tab/><text:tab/><text:tab/></text:p>
      <text:p text:style-name="P1"><text:tab/><text:tab/><text:tab/>LSR<text:tab/><text:tab/>R1, R1, #1</text:p>
      <text:p text:style-name="P1"><text:tab/><text:tab/><text:tab/>CMP<text:tab/><text:tab/>R1, #0</text:p>
      <text:p text:style-name="P1"><text:tab/><text:tab/><text:tab/>BNE<text:tab/><text:tab/>cuatroquesos</text:p>
      <text:p text:style-name="P1"><text:tab/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7T20:22:10.134986463</meta:creation-date>
    <dc:date>2026-04-07T20:37:13.868018846</dc:date>
    <meta:editing-duration>PT4M27S</meta:editing-duration>
    <meta:editing-cycles>1</meta:editing-cycles>
    <meta:document-statistic meta:table-count="0" meta:image-count="0" meta:object-count="0" meta:page-count="1" meta:paragraph-count="28" meta:word-count="69" meta:character-count="365" meta:non-whitespace-character-count="233"/>
    <meta:generator>LibreOffice/25.2.7.2$Linux_X86_64 LibreOffice_project/520$Build-2</meta:generator>
  </office:meta>
</office:document-meta>
</file>