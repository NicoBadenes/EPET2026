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MOV<text:tab/><text:tab/>R0, #2 ;op1</text:p>
      <text:p text:style-name="Standard"><text:tab/><text:tab/><text:tab/>MOV<text:tab/><text:tab/>R1, #12 ;op2</text:p>
      <text:p text:style-name="Standard"><text:tab/><text:tab/><text:tab/></text:p>
      <text:p text:style-name="Standard"><text:tab/><text:tab/><text:tab/>MOV<text:tab/><text:tab/>R2, #3 ;NumOperador</text:p>
      <text:p text:style-name="Standard"><text:tab/><text:tab/><text:tab/></text:p>
      <text:p text:style-name="Standard"><text:tab/><text:tab/><text:tab/>MOV<text:tab/><text:tab/>R11, #1 ;trash bit</text:p>
      <text:p text:style-name="Standard"><text:tab/><text:tab/><text:tab/>MOV<text:tab/><text:tab/>R12, #0 ;trash bit</text:p>
      <text:p text:style-name="Standard"><text:tab/><text:tab/><text:tab/>MOV<text:tab/><text:tab/>R10, #-1 ;trash bit</text:p>
      <text:p text:style-name="Standard"><text:tab/><text:tab/><text:tab/></text:p>
      <text:p text:style-name="Standard"><text:tab/><text:tab/><text:tab/>CMP<text:tab/><text:tab/>R2, #2 ;comp Operacion</text:p>
      <text:p text:style-name="Standard"><text:tab/><text:tab/><text:tab/></text:p>
      <text:p text:style-name="Standard"><text:tab/><text:tab/><text:tab/>BCC<text:tab/><text:tab/>suma</text:p>
      <text:p text:style-name="Standard"><text:tab/><text:tab/><text:tab/>BEQ<text:tab/><text:tab/>resta</text:p>
      <text:p text:style-name="Standard"><text:tab/><text:tab/><text:tab/>BHI<text:tab/><text:tab/>multiplicacion</text:p>
      <text:p text:style-name="Standard"><text:tab/><text:tab/><text:tab/></text:p>
      <text:p text:style-name="Standard"><text:tab/><text:tab/><text:tab/>;---</text:p>
      <text:p text:style-name="Standard"><text:tab/><text:tab/><text:tab/></text:p>
      <text:p text:style-name="Standard">suma</text:p>
      <text:p text:style-name="Standard"><text:tab/><text:tab/><text:tab/>ADD<text:tab/><text:tab/>R3, R0, R1 ;suma op1 y op2</text:p>
      <text:p text:style-name="Standard"><text:tab/><text:tab/><text:tab/>END</text:p>
      <text:p text:style-name="Standard"><text:tab/><text:tab/><text:tab/></text:p>
      <text:p text:style-name="Standard"><text:tab/><text:tab/><text:tab/>;---</text:p>
      <text:p text:style-name="Standard"><text:tab/><text:tab/><text:tab/></text:p>
      <text:p text:style-name="Standard">resta</text:p>
      <text:p text:style-name="Standard"><text:tab/><text:tab/><text:tab/>SUB<text:tab/><text:tab/>R3, R0, R1 ;resta op1 y op2</text:p>
      <text:p text:style-name="Standard"><text:tab/><text:tab/><text:tab/>END</text:p>
      <text:p text:style-name="Standard"><text:tab/><text:tab/><text:tab/></text:p>
      <text:p text:style-name="Standard"><text:tab/><text:tab/><text:tab/>;---</text:p>
      <text:p text:style-name="Standard">multiplicacion</text:p>
      <text:p text:style-name="Standard"><text:tab/><text:tab/><text:tab/></text:p>
      <text:p text:style-name="Standard"><text:tab/><text:tab/><text:tab/>MOV<text:tab/><text:tab/>R3, #0 <text:s text:c="5"/>; sumador</text:p>
      <text:p text:style-name="Standard"><text:tab/><text:tab/><text:tab/>MOV<text:tab/><text:tab/>R11, #1 <text:s text:c="4"/>; index de mascara</text:p>
      <text:p text:style-name="Standard"><text:tab/><text:tab/><text:tab/></text:p>
      <text:p text:style-name="Standard">again</text:p>
      <text:p text:style-name="Standard"><text:tab/><text:tab/><text:tab/></text:p>
      <text:p text:style-name="Standard"><text:tab/><text:tab/><text:tab/>ANDS<text:tab/><text:tab/>R4, R1, R11 ; Compara R1 con la máscara R11</text:p>
      <text:p text:style-name="Standard"><text:tab/><text:tab/><text:tab/></text:p>
      <text:p text:style-name="Standard"><text:tab/><text:tab/><text:tab/>ADDNE<text:tab/>R3, R3, R0 <text:s/>; Suma R0 al total (R3)</text:p>
      <text:p text:style-name="Standard"><text:tab/><text:tab/><text:tab/></text:p>
      <text:p text:style-name="Standard"><text:tab/><text:tab/><text:tab/>LSL<text:tab/><text:tab/>R0, R0, #1 <text:s/>; Desplaza R0 (op1)</text:p>
      <text:p text:style-name="Standard"><text:tab/><text:tab/><text:tab/></text:p>
      <text:p text:style-name="Standard"><text:tab/><text:tab/><text:tab/>LSLS<text:tab/><text:tab/>R11, R11, #1 ; Mueve el index</text:p>
      <text:p text:style-name="Standard"><text:tab/><text:tab/><text:tab/></text:p>
      <text:p text:style-name="Standard"><text:tab/><text:tab/><text:tab/>BNE<text:tab/><text:tab/>again</text:p>
      <text:p text:style-name="Standard"><text:tab/><text:tab/><text:tab/></text:p>
      <text:p text:style-name="Standard"><text:tab/><text:tab/><text:tab/>END</text:p>
      <text:p text:style-name="Standard">;---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8T21:26:38.167486712</meta:creation-date>
    <meta:generator>LibreOffice/25.8.6.2$Linux_X86_64 LibreOffice_project/580$Build-2</meta:generator>
    <dc:date>2026-05-05T18:59:16.951704405</dc:date>
    <meta:editing-duration>PT19H37M44S</meta:editing-duration>
    <meta:editing-cycles>3</meta:editing-cycles>
    <meta:document-statistic meta:table-count="0" meta:image-count="0" meta:object-count="0" meta:page-count="1" meta:paragraph-count="47" meta:word-count="116" meta:character-count="666" meta:non-whitespace-character-count="425"/>
  </office:meta>
</office:document-meta>
</file>