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69d2" officeooo:paragraph-rsid="000369d2"/>
    </style:style>
    <style:style style:name="P2" style:family="paragraph" style:parent-style-name="Standard">
      <style:text-properties officeooo:rsid="0003c453" officeooo:paragraph-rsid="0003c4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<text:tab/><text:tab/>MOV<text:tab/><text:tab/>R0, #255</text:p>
      <text:p text:style-name="P1"/>
      <text:p text:style-name="P1">2)</text:p>
      <text:p text:style-name="P1"><text:tab/><text:tab/>LDR R2, =1234</text:p>
      <text:p text:style-name="P1"/>
      <text:p text:style-name="P1">3)</text:p>
      <text:p text:style-name="P1"><text:tab/><text:tab/>LDR<text:tab/><text:tab/>R2, =1234</text:p>
      <text:p text:style-name="P1"><text:tab/><text:tab/>MOV<text:tab/><text:tab/>R3, #0x10000</text:p>
      <text:p text:style-name="P1"><text:tab/><text:tab/>STR<text:tab/><text:tab/>R2, [R3]</text:p>
      <text:p text:style-name="P1"/>
      <text:p text:style-name="P2">4)</text:p>
      <text:p text:style-name="P2"/>
      <text:p text:style-name="P2"><text:tab/><text:tab/>MOV<text:tab/><text:tab/>R0, #255</text:p>
      <text:p text:style-name="P2"><text:tab/><text:tab/>LDR<text:tab/><text:tab/>R2, =1234</text:p>
      <text:p text:style-name="P2"><text:tab/><text:tab/>MOV<text:tab/><text:tab/>R3, #0x10000</text:p>
      <text:p text:style-name="P2"><text:tab/><text:tab/>STR<text:tab/><text:tab/>R2, [R3]</text:p>
      <text:p text:style-name="P2"><text:tab/><text:tab/>ADD<text:tab/><text:tab/>R4, R2, R2</text:p>
      <text:p text:style-name="P2"><text:tab/><text:tab/>STR<text:tab/><text:tab/>R4, [R3, #4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8T17:28:04.057641224</meta:creation-date>
    <dc:date>2026-04-28T17:50:47.624483287</dc:date>
    <meta:editing-duration>PT12M27S</meta:editing-duration>
    <meta:editing-cycles>1</meta:editing-cycles>
    <meta:generator>LibreOffice/25.8.6.2$Linux_X86_64 LibreOffice_project/580$Build-2</meta:generator>
    <meta:document-statistic meta:table-count="0" meta:image-count="0" meta:object-count="0" meta:page-count="1" meta:paragraph-count="15" meta:word-count="39" meta:character-count="189" meta:non-whitespace-character-count="133"/>
  </office:meta>
</office:document-meta>
</file>