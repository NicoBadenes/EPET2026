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9000002D5494C9EF7.png" manifest:media-type="image/png"/>
  <manifest:file-entry manifest:full-path="Pictures/1000000100000379000002D5D48292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rsid="00031661" officeooo:paragraph-rsid="00031661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officeooo:rsid="00031661"/>
    </style:style>
    <style:style style:name="P3" style:family="paragraph" style:parent-style-name="Text_20_body" style:list-style-name="L1">
      <style:text-properties officeooo:rsid="00031661"/>
    </style:style>
    <style:style style:name="P4" style:family="paragraph" style:parent-style-name="Text_20_body">
      <style:text-properties officeooo:rsid="00031661"/>
    </style:style>
    <style:style style:name="P5" style:family="paragraph" style:parent-style-name="Text_20_body">
      <style:text-properties officeooo:rsid="0007a6c0" officeooo:paragraph-rsid="0007a6c0"/>
    </style:style>
    <style:style style:name="P6" style:family="paragraph" style:parent-style-name="Standard">
      <style:text-properties officeooo:rsid="00031661" officeooo:paragraph-rsid="00031661"/>
    </style:style>
    <style:style style:name="P7" style:family="paragraph" style:parent-style-name="Standard">
      <style:text-properties officeooo:rsid="0007a6c0" officeooo:paragraph-rsid="0007a6c0"/>
    </style:style>
    <style:style style:name="T1" style:family="text">
      <style:text-properties officeooo:rsid="0007a6c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Incorporar un ícono representativo <text:span text:style-name="T1">a gusto.</text:span></text:p>
        </text:list-item>
        <text:list-item>
          <text:p text:style-name="P2">Modificar los colores de fondo en cada una de las pantallas de la aplicación. </text:p>
        </text:list-item>
        <text:list-item>
          <text:p text:style-name="P2">Implementar una tipografía <text:span text:style-name="T1">diferente</text:span>, importada desde Google Fonts. </text:p>
        </text:list-item>
        <text:list-item>
          <text:p text:style-name="P3">Reemplazar el texto del botón “Empezar” por un ícono de reproducción (Play) y el de “Stop” por su símbolo correspondiente.</text:p>
        </text:list-item>
      </text:list>
      <text:p text:style-name="P4"/>
      <text:p text:style-name="P5">Pull request:</text:p>
      <text:p text:style-name="P6"/>
      <text:p text:style-name="P7"><draw:frame draw:style-name="fr1" draw:name="Image1" text:anchor-type="char" svg:width="6.9252in" svg:height="5.6472in" draw:z-index="0"><draw:image xlink:href="Pictures/1000000100000379000002D5D48292AC.png" xlink:type="simple" xlink:show="embed" xlink:actuate="onLoad" draw:mime-type="image/png"/></draw:frame></text:p>
      <text:p text:style-name="P7">Comentario y pull request aceptado:</text:p>
      <text:p text:style-name="P7"><draw:frame draw:style-name="fr1" draw:name="Image2" text:anchor-type="char" svg:width="6.9252in" svg:height="5.6472in" draw:z-index="1"><draw:image xlink:href="Pictures/1000000100000379000002D5494C9EF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10:29:16.735145578</meta:creation-date>
    <dc:date>2026-04-15T11:33:13.023384237</dc:date>
    <meta:editing-duration>PT7M41S</meta:editing-duration>
    <meta:editing-cycles>1</meta:editing-cycles>
    <meta:document-statistic meta:table-count="0" meta:image-count="2" meta:object-count="0" meta:page-count="2" meta:paragraph-count="6" meta:word-count="59" meta:character-count="363" meta:non-whitespace-character-count="312"/>
    <meta:generator>LibreOffice/25.2.7.2$Linux_X86_64 LibreOffice_project/520$Build-2</meta:generator>
  </office:meta>
</office:document-meta>
</file>