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9847in" table:align="left"/>
    </style:style>
    <style:style style:name="Table1.A" style:family="table-column">
      <style:table-column-properties style:column-width="2.2944in"/>
    </style:style>
    <style:style style:name="Table1.B" style:family="table-column">
      <style:table-column-properties style:column-width="0.6285in"/>
    </style:style>
    <style:style style:name="Table1.C" style:family="table-column">
      <style:table-column-properties style:column-width="1.061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0542in" table:align="left"/>
    </style:style>
    <style:style style:name="Table2.A" style:family="table-column">
      <style:table-column-properties style:column-width="0.5188in"/>
    </style:style>
    <style:style style:name="Table2.B" style:family="table-column">
      <style:table-column-properties style:column-width="1.9194in"/>
    </style:style>
    <style:style style:name="Table2.C" style:family="table-column">
      <style:table-column-properties style:column-width="1.9632in"/>
    </style:style>
    <style:style style:name="Table2.D" style:family="table-column">
      <style:table-column-properties style:column-width="1.6528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Heading_20_1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Heading_20_2">
      <style:text-properties fo:font-size="12pt" style:font-size-asian="10.5pt" style:font-size-complex="12pt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Heading_20_3">
      <style:text-properties fo:font-size="12pt" style:font-size-asian="10.5pt" style:font-size-complex="12pt"/>
    </style:style>
    <style:style style:name="P6" style:family="paragraph" style:parent-style-name="Text_20_body" style:list-style-name="L1">
      <style:paragraph-properties fo:margin-left="0in" fo:margin-right="0in" fo:text-indent="0in" style:auto-text-indent="false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8" style:family="paragraph" style:parent-style-name="Table_20_Contents">
      <style:text-properties fo:font-weight="bold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Quotations">
      <style:paragraph-properties fo:margin-left="0.3937in" fo:margin-right="0.3937in" fo:text-indent="0in" style:auto-text-indent="false"/>
    </style:style>
    <style:style style:name="P11" style:family="paragraph" style:parent-style-name="Text_20_body" style:list-style-name="L2">
      <style:paragraph-properties fo:margin-left="0in" fo:margin-right="0in" fo:text-indent="0in" style:auto-text-indent="false"/>
      <style:text-properties officeooo:paragraph-rsid="0002b15d"/>
    </style:style>
    <style:style style:name="P12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  <style:text-properties officeooo:paragraph-rsid="0002b15d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officeooo:rsid="0002b15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PET N° 12</text:p>
      <text:p text:style-name="P1"/>
      <text:p text:style-name="P1"/>
      <text:p text:style-name="P1">ING JUAN CARLOS FONTANIVE</text:p>
      <text:p text:style-name="P1">SAN MARTÍN DE LOS ANDES</text:p>
      <text:p text:style-name="P1"/>
      <text:p text:style-name="P1"/>
      <text:p text:style-name="P1">ALUMNOS</text:p>
      <text:p text:style-name="P1">Russo, Aucan</text:p>
      <text:p text:style-name="P1">Rocca, Santiago</text:p>
      <text:p text:style-name="P1">Badenes, Nicolás</text:p>
      <text:p text:style-name="P1">Chatruc, José</text:p>
      <text:p text:style-name="P1"/>
      <text:p text:style-name="P1"/>
      <text:p text:style-name="P1">PROFESOR</text:p>
      <text:p text:style-name="P1">Alarcón, Cristian</text:p>
      <text:p text:style-name="P1"/>
      <text:p text:style-name="P1"/>
      <text:p text:style-name="P1">CURSO Y DIVISIÓN</text:p>
      <text:p text:style-name="P1"/>
      <text:p text:style-name="P1"/>
      <text:p text:style-name="P1">6° 5°</text:p>
      <text:p text:style-name="P1"/>
      <text:p text:style-name="P1"/>
      <text:p text:style-name="P1">AÑO</text:p>
      <text:p text:style-name="P1">2026</text:p>
      <text:p text:style-name="P1"/>
      <text:p text:style-name="P1">MATERIA</text:p>
      <text:p text:style-name="P1">Construcción de Software</text:p>
      <text:h text:style-name="P2" text:outline-level="1"><text:soft-page-break/>ETAPA II: INVESTIGACIÓN PRELIMINAR - PROYECTO "EL PELUCA"</text:h>
      <text:h text:style-name="P3" text:outline-level="2">1. Aclaración de la Solicitud</text:h>
      <text:p text:style-name="P4"><text:bookmark text:name="p-rc_4fb28d1937a0164a-107"/>Antes de iniciar, se determinó que el solicitante requiere una herramienta que no solo agende turnos, sino que resuelva la pérdida de dinero por inasistencias y la falta de control sobre sus herramientas de trabajo. La solicitud queda definida como: <text:span text:style-name="T1">"Desarrollo de una aplicación móvil nativa para Android que centralice la gestión de turnos, el flujo de caja diario y el inventario de activos fijos"</text:span>.</text:p>
      <text:h text:style-name="P3" text:outline-level="2">2. Estudio de Factibilidad</text:h>
      <text:h text:style-name="P5" text:outline-level="3">A. Factibilidad Técnica</text:h>
      <text:p text:style-name="P4"><text:bookmark text:name="p-rc_4fb28d1937a0164a-108"/>El equipo determina que el proyecto es viable técnicamente bajo las siguientes condiciones:</text:p>
      <text:list text:style-name="L1">
        <text:list-item>
          <text:p text:style-name="P6"><text:bookmark text:name="p-rc_4fb28d1937a0164a-109"/><text:span text:style-name="T1">Hardware:</text:span> Se utilizará el equipamiento actual del equipo de desarrollo para la programación. Para las pruebas, se usarán dispositivos Android con versión 10.0 o superior.</text:p>
        </text:list-item>
        <text:list-item>
          <text:p text:style-name="P6"><text:bookmark text:name="p-rc_4fb28d1937a0164a-110"/><text:span text:style-name="T1">Software (Stack Tecnológico):</text:span> Se optó por <text:span text:style-name="T1">React Native</text:span> con <text:span text:style-name="T1">JavaScript</text:span> por su agilidad y <text:span text:style-name="T1">Firebase</text:span> de Google para la base de datos en la nube. Esto permite tener el sistema funcionando sin necesidad de un servidor físico en la barbería.</text:p>
        </text:list-item>
        <text:list-item>
          <text:p text:style-name="P7"><text:bookmark text:name="p-rc_4fb28d1937a0164a-111"/><text:span text:style-name="T1">Personal:</text:span> El equipo de desarrollo posee los conocimientos en lógica de programación necesarios para implementar estas tecnologías.</text:p>
          <text:p text:style-name="P7"/>
        </text:list-item>
      </text:list>
      <text:h text:style-name="P5" text:outline-level="3">B. Factibilidad Económica</text:h>
      <text:p text:style-name="P4"><text:bookmark text:name="p-rc_4fb28d1937a0164a-112"/>El objetivo es que el sistema se pague solo mediante la optimización del negocio.</text:p>
      <text:p text:style-name="P4"><text:bookmark text:name="p-rc_4fb28d1937a0164a-113"/>Estructura de Costos 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oncepto</text:p>
            </table:table-cell>
            <table:table-cell table:style-name="Table1.A1" office:value-type="string">
              <text:p text:style-name="Table_20_Heading">Tipo</text:p>
            </table:table-cell>
            <table:table-cell table:style-name="Table1.A1" office:value-type="string">
              <text:p text:style-name="Table_20_Heading">Monto (ARS)</text:p>
            </table:table-cell>
          </table:table-row>
        </table:table-header-rows>
        <table:table-row>
          <table:table-cell table:style-name="Table1.A1" office:value-type="string">
            <text:p text:style-name="Table_20_Contents">Licencia Google Play Console</text:p>
          </table:table-cell>
          <table:table-cell table:style-name="Table1.A1" office:value-type="string">
            <text:p text:style-name="Table_20_Contents">Fijo</text:p>
          </table:table-cell>
          <table:table-cell table:style-name="Table1.A1" office:value-type="string">
            <text:p text:style-name="Table_20_Contents">$35.000</text:p>
          </table:table-cell>
        </table:table-row>
        <table:table-row>
          <table:table-cell table:style-name="Table1.A1" office:value-type="string">
            <text:p text:style-name="Table_20_Contents">Desarrollo y Programación</text:p>
          </table:table-cell>
          <table:table-cell table:style-name="Table1.A1" office:value-type="string">
            <text:p text:style-name="Table_20_Contents">Fijo</text:p>
          </table:table-cell>
          <table:table-cell table:style-name="Table1.A1" office:value-type="string">
            <text:p text:style-name="Table_20_Contents">$900.000</text:p>
          </table:table-cell>
        </table:table-row>
        <table:table-row>
          <table:table-cell table:style-name="Table1.A1" office:value-type="string">
            <text:p text:style-name="Table_20_Contents">Mantenimiento de Base de Datos</text:p>
          </table:table-cell>
          <table:table-cell table:style-name="Table1.A1" office:value-type="string">
            <text:p text:style-name="Table_20_Contents">Variable</text:p>
          </table:table-cell>
          <table:table-cell table:style-name="Table1.A1" office:value-type="string">
            <text:p text:style-name="Table_20_Contents">$5.000 / mes</text:p>
          </table:table-cell>
        </table:table-row>
        <table:table-row>
          <table:table-cell table:style-name="Table1.A1" office:value-type="string">
            <text:p text:style-name="P8">Total Inversión Inicial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$935.000</text:p>
          </table:table-cell>
        </table:table-row>
      </table:table>
      <text:p text:style-name="P4"><text:bookmark text:name="p-rc_4fb28d1937a0164a-114"/><text:line-break/>Estimación de Ventas y Beneficios (12 meses) </text:p>
      <text:p text:style-name="P4"><text:bookmark text:name="p-rc_4fb28d1937a0164a-115"/>Se estima que la app generará un beneficio indirecto al evitar cancelaciones y mejorar el control de gastos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Mes</text:p>
            </table:table-cell>
            <table:table-cell table:style-name="Table2.A1" office:value-type="string">
              <text:p text:style-name="Table_20_Heading">Ahorro por Turnos (ARS)</text:p>
            </table:table-cell>
            <table:table-cell table:style-name="Table2.A1" office:value-type="string">
              <text:p text:style-name="Table_20_Heading">Control de Insumos (ARS)</text:p>
            </table:table-cell>
            <table:table-cell table:style-name="Table2.A1" office:value-type="string">
              <text:p text:style-name="Table_20_Heading">Total Beneficio (ARS)</text:p>
            </table:table-cell>
          </table:table-row>
        </table:table-header-rows>
        <table:table-row>
          <table:table-cell table:style-name="Table2.A1" office:value-type="string">
            <text:p text:style-name="Table_20_Contents">1-3</text:p>
          </table:table-cell>
          <table:table-cell table:style-name="Table2.A1" office:value-type="string">
            <text:p text:style-name="Table_20_Contents">$40.000</text:p>
          </table:table-cell>
          <table:table-cell table:style-name="Table2.A1" office:value-type="string">
            <text:p text:style-name="Table_20_Contents">$15.000</text:p>
          </table:table-cell>
          <table:table-cell table:style-name="Table2.A1" office:value-type="string">
            <text:p text:style-name="Table_20_Contents">$55.000</text:p>
          </table:table-cell>
        </table:table-row>
        <table:table-row>
          <table:table-cell table:style-name="Table2.A1" office:value-type="string">
            <text:p text:style-name="Table_20_Contents">4-6</text:p>
          </table:table-cell>
          <table:table-cell table:style-name="Table2.A1" office:value-type="string">
            <text:p text:style-name="Table_20_Contents">$70.000</text:p>
          </table:table-cell>
          <table:table-cell table:style-name="Table2.A1" office:value-type="string">
            <text:p text:style-name="Table_20_Contents">$20.000</text:p>
          </table:table-cell>
          <table:table-cell table:style-name="Table2.A1" office:value-type="string">
            <text:p text:style-name="Table_20_Contents">$90.000</text:p>
          </table:table-cell>
        </table:table-row>
        <table:table-row>
          <table:table-cell table:style-name="Table2.A1" office:value-type="string">
            <text:p text:style-name="Table_20_Contents">7-12</text:p>
          </table:table-cell>
          <table:table-cell table:style-name="Table2.A1" office:value-type="string">
            <text:p text:style-name="Table_20_Contents">$110.000</text:p>
          </table:table-cell>
          <table:table-cell table:style-name="Table2.A1" office:value-type="string">
            <text:p text:style-name="Table_20_Contents">$25.000</text:p>
          </table:table-cell>
          <table:table-cell table:style-name="Table2.A1" office:value-type="string">
            <text:p text:style-name="Table_20_Contents">$135.000</text:p>
          </table:table-cell>
        </table:table-row>
        <table:table-row>
          <table:table-cell table:style-name="Table2.A1" office:value-type="string">
            <text:p text:style-name="P8">Anual</text:p>
          </table:table-cell>
          <table:table-cell table:style-name="Table2.A1" office:value-type="string">
            <text:p text:style-name="P8">$900.000</text:p>
          </table:table-cell>
          <table:table-cell table:style-name="Table2.A1" office:value-type="string">
            <text:p text:style-name="P8">$240.000</text:p>
          </table:table-cell>
          <table:table-cell table:style-name="Table2.A1" office:value-type="string">
            <text:p text:style-name="P8">$1.140.000</text:p>
          </table:table-cell>
        </table:table-row>
      </table:table>
      <text:p text:style-name="Text_20_body"/>
      <text:p text:style-name="P10"><text:bookmark text:name="p-rc_4fb28d1937a0164a-116"/><text:soft-page-break/><text:span text:style-name="T1">Cálculo de Retorno:</text:span> La inversión de <text:span text:style-name="T1">$935.000</text:span> se recupera aproximadamente en el <text:span text:style-name="T1">mes 10</text:span> de uso operativo, lo que demuestra que el proyecto es rentable.</text:p>
      <text:h text:style-name="P5" text:outline-level="3">C. Factibilidad Operativa</text:h>
      <text:list text:style-name="L2">
        <text:list-item>
          <text:p text:style-name="P11"><text:bookmark text:name="p-rc_4fb28d1937a0164a-117"/><text:span text:style-name="T1">Uso del sistema:</text:span> "El Peluca" y sus empleados han mostrado total disposición para abandonar el registro en papel y WhatsApp.</text:p>
        </text:list-item>
        <text:list-item>
          <text:p text:style-name="P11"><text:bookmark text:name="p-rc_4fb28d1937a0164a-118"/><text:span text:style-name="T1">Resistencia al cambio:</text:span> Para evitarla, se diseñará una interfaz con botones grandes y pocos pasos para agendar turnos.</text:p>
        </text:list-item>
        <text:list-item>
          <text:p text:style-name="P12"><text:span text:style-name="T1">Capacitación:</text:span> Se realizará una charla técnica con <text:span text:style-name="T2">el cliente y sus empleados</text:span> para asegurar que todos sepan cargar los gastos diarios.</text:p>
        </text:list-item>
      </text:list>
      <text:h text:style-name="P3" text:outline-level="2">3. Aprobación de la Solicitud</text:h>
      <text:p text:style-name="P13"><text:bookmark text:name="p-rc_4fb28d1937a0164a-120"/>Tras analizar que contamos con la tecnología (React Native), que el cliente ganará más dinero del que gasta en la app y que los empleados están listos para usarla, <text:span text:style-name="T1">se aprueba el inicio inmediato del desarrollo</text:span>. El proyecto se integra al calendario de trabajo del ciclo lectivo 2026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7T11:12:18.852144769</meta:creation-date>
    <dc:date>2026-04-07T11:39:24.503630643</dc:date>
    <meta:editing-duration>PT1M22S</meta:editing-duration>
    <meta:editing-cycles>1</meta:editing-cycles>
    <meta:generator>LibreOffice/25.2.7.2$Linux_X86_64 LibreOffice_project/520$Build-2</meta:generator>
    <meta:document-statistic meta:table-count="2" meta:image-count="0" meta:object-count="0" meta:page-count="3" meta:paragraph-count="72" meta:word-count="463" meta:character-count="2869" meta:non-whitespace-character-count="2481"/>
  </office:meta>
</office:document-meta>
</file>