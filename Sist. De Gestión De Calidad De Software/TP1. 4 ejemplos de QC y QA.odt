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erif" fo:font-style="normal" fo:font-weight="normal" officeooo:rsid="00099970" officeooo:paragraph-rsid="00099970" style:font-style-asian="normal" style:font-weight-asian="normal" style:font-style-complex="normal" style:font-weight-complex="normal"/>
    </style:style>
    <style:style style:name="P2" style:family="paragraph" style:parent-style-name="Text_20_body">
      <style:text-properties style:font-name="Liberation Serif" fo:font-style="normal" officeooo:paragraph-rsid="00099970" style:font-style-asian="normal" style:font-style-complex="normal"/>
    </style:style>
    <style:style style:name="P3" style:family="paragraph" style:parent-style-name="Text_20_body" style:list-style-name="L1">
      <style:text-properties style:font-name="Liberation Serif"/>
    </style:style>
    <style:style style:name="P4" style:family="paragraph" style:parent-style-name="Text_20_body" style:list-style-name="L2">
      <style:text-properties style:font-name="Liberation Serif" fo:font-style="normal" style:font-style-asian="normal" style:font-style-complex="normal"/>
    </style:style>
    <style:style style:name="P5" style:family="paragraph" style:parent-style-name="Standard">
      <style:text-properties style:font-name="Liberation Serif" fo:font-style="normal" officeooo:rsid="00099970" officeooo:paragraph-rsid="00099970" style:font-style-asian="normal" style:font-style-complex="normal"/>
    </style:style>
    <style:style style:name="P6" style:family="paragraph" style:parent-style-name="Text_20_body">
      <style:text-properties style:font-name="Liberation Serif" fo:font-style="normal" officeooo:rsid="00099970" officeooo:paragraph-rsid="00099970" style:font-style-asian="normal" style:font-style-complex="normal"/>
    </style:style>
    <style:style style:name="P7" style:family="paragraph" style:parent-style-name="Text_20_body" style:list-style-name="L3">
      <style:text-properties style:font-name="Liberation Serif" fo:font-style="normal" officeooo:rsid="00099970" style:font-style-asian="normal" style:font-style-complex="normal"/>
    </style:style>
    <style:style style:name="P8" style:family="paragraph" style:parent-style-name="Text_20_body" style:list-style-name="L4">
      <style:text-properties style:font-name="Liberation Serif" officeooo:rsid="00099970"/>
    </style:style>
    <style:style style:name="P9" style:family="paragraph" style:parent-style-name="Text_20_body">
      <style:text-properties style:font-name="Liberation Serif" officeooo:rsid="00099970" officeooo:paragraph-rsid="00099970"/>
    </style:style>
    <style:style style:name="P10" style:family="paragraph" style:parent-style-name="Text_20_body" style:list-style-name="L5">
      <style:text-properties style:font-name="Liberation Serif" fo:font-style="normal" officeooo:rsid="00099970" style:font-style-asian="normal" style:font-style-complex="normal"/>
    </style:style>
    <style:style style:name="P11" style:family="paragraph" style:parent-style-name="Text_20_body" style:list-style-name="L6">
      <style:text-properties style:font-name="Liberation Serif" officeooo:rsid="00099970"/>
    </style:style>
    <style:style style:name="P12" style:family="paragraph" style:parent-style-name="Text_20_body" style:list-style-name="L7">
      <style:text-properties style:font-name="Liberation Serif" fo:font-style="normal" officeooo:rsid="00099970" style:font-style-asian="normal" style:font-style-complex="normal"/>
    </style:style>
    <style:style style:name="P13" style:family="paragraph" style:parent-style-name="Text_20_body" style:list-style-name="L8">
      <style:text-properties style:font-name="Liberation Serif" officeooo:rsid="00099970"/>
    </style:style>
    <style:style style:name="T1" style:family="text">
      <style:text-properties fo:font-weight="bold"/>
    </style:style>
    <style:style style:name="T2" style:family="text">
      <style:text-properties style:font-name="Liberation Serif"/>
    </style:style>
    <style:style style:name="T3" style:family="text">
      <style:text-properties fo:font-style="normal" fo:font-weight="bold"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Liberation Serif" fo:font-style="normal" style:font-style-asian="normal" style:font-style-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text:span text:style-name="T1">El Bug:</text:span> El sistema presenta una vulnerabilidad de autorización. El backend no verifica si el usuario que está realizando la solicitud es el verdadero dueño de la cuenta, permitiendo que cualquier usuario autenticado acceda a la información privada de otros perfiles simplemente alterando el parámetro <text:span text:style-name="Source_20_Text"><text:span text:style-name="T2">id</text:span></text:span> en la URL.</text:p>
      <text:list text:style-name="L1">
        <text:list-item>
          <text:p text:style-name="P3"><text:span text:style-name="T3">QC (Control de Calidad - Detectar el bug):</text:span><text:span text:style-name="T4"> Un tester crea dos cuentas de usuario (Usuario A con ID 15 y Usuario B con ID 16). Inicia sesión como el Usuario A, entra a la página de edición de perfil (</text:span><text:span text:style-name="Source_20_Text"><text:span text:style-name="T5">/perfil?id=15</text:span></text:span><text:span text:style-name="T4">), va a la barra de direcciones del navegador, cambia el </text:span><text:span text:style-name="Source_20_Text"><text:span text:style-name="T5">15</text:span></text:span><text:span text:style-name="T4"> por un </text:span><text:span text:style-name="Source_20_Text"><text:span text:style-name="T5">16</text:span></text:span><text:span text:style-name="T4"> y presiona Enter. Documenta que el sistema le permitió ver los datos del Usuario B y levanta un reporte de error crítico.</text:span></text:p>
        </text:list-item>
      </text:list>
      <text:list text:style-name="L2">
        <text:list-item>
          <text:p text:style-name="P4"><text:span text:style-name="T1">QA (Aseguramiento de Calidad - Prevenir el bug):</text:span> El equipo define una política de desarrollo obligatoria: "Nunca se debe confiar en el ID proporcionado por el cliente en la URL". Se establece como estándar que el backend siempre debe extraer el ID del usuario directamente del token de sesión (el cual está encriptado) y no de los parámetros de la URL.</text:p>
        </text:list-item>
      </text:list>
      <text:p text:style-name="P5">2)</text:p>
      <text:p text:style-name="P5"/>
      <text:p text:style-name="P6"><text:span text:style-name="T1">El Bug:</text:span> Al hacer clic y arrastrar una ventana por la pantalla, si el usuario mueve el ratón muy rápido hacia el borde, la ventana se queda atascada fuera de los límites y no se puede volver a agarrar. Esto ocurre porque los eventos de JavaScript no están limpiando el estado del clic.</text:p>
      <text:list text:style-name="L3">
        <text:list-item>
          <text:p text:style-name="P7"><text:span text:style-name="T1">QC (Detección):</text:span> Un tester se dedica a mover las ventanas erráticamente por la interfaz, intentando "romper" el movimiento. Logra reproducir el error al sacar el cursor rápidamente de la pantalla, toma captura del comportamiento y registra el bug detallando qué navegadores fallan.</text:p>
        </text:list-item>
      </text:list>
      <text:list text:style-name="L4">
        <text:list-item>
          <text:p text:style-name="P8"><text:span text:style-name="T3">QA (Prevención):</text:span><text:span text:style-name="T4"> El equipo actualiza su guía de estilo de código. Se establece una regla obligatoria: todo evento </text:span><text:span text:style-name="Source_20_Text"><text:span text:style-name="T5">mousedown</text:span></text:span><text:span text:style-name="T4"> utilizado para "arrastrar y soltar" (drag and drop) debe incluir obligatoriamente funciones de limpieza en los eventos </text:span><text:span text:style-name="Source_20_Text"><text:span text:style-name="T5">mouseup</text:span></text:span><text:span text:style-name="T4"> y </text:span><text:span text:style-name="Source_20_Text"><text:span text:style-name="T5">mouseleave</text:span></text:span><text:span text:style-name="T4"> para garantizar que el elemento se suelte correctamente.</text:span></text:p>
        </text:list-item>
      </text:list>
      <text:p text:style-name="P5">3)</text:p>
      <text:p text:style-name="P5"/>
      <text:p text:style-name="P9"><text:span text:style-name="T3">El Bug:</text:span><text:span text:style-name="T4"> El programa entra en un bucle infinito y congela el sistema al intentar multiplicar por cero. Esto sucede porque se usó una instrucción de resta simple (</text:span><text:span text:style-name="Source_20_Text"><text:span text:style-name="T5">SUB</text:span></text:span><text:span text:style-name="T4">) en lugar de la instrucción que actualiza las banderas de estado (</text:span><text:span text:style-name="Source_20_Text"><text:span text:style-name="T5">SUBS</text:span></text:span><text:span text:style-name="T4">), por lo que la bandera de "Cero" (Zero flag) nunca se activa para salir del ciclo.</text:span></text:p>
      <text:list text:style-name="L5">
        <text:list-item>
          <text:p text:style-name="P10"><text:span text:style-name="T1">QC (Detección):</text:span> El tester ejecuta el código assembly en un emulador pasando diferentes casos de prueba (multiplicar por números positivos, negativos y por cero). Al probar con el cero, nota que el programa se cuelga, revisa el estado de los registros en ese instante y reporta el fallo.</text:p>
        </text:list-item>
      </text:list>
      <text:list text:style-name="L6">
        <text:list-item>
          <text:p text:style-name="P11"><text:span text:style-name="T3">QA (Prevención):</text:span><text:span text:style-name="T4"> Se implementa una plantilla de revisión de código (Checklist) en el repositorio. Antes de aprobar cualquier bloque de código en assembly que contenga bucles </text:span><text:soft-page-break/><text:span text:style-name="T4">(</text:span><text:span text:style-name="Source_20_Text"><text:span text:style-name="T5">BNE</text:span></text:span><text:span text:style-name="T4">, </text:span><text:span text:style-name="Source_20_Text"><text:span text:style-name="T5">BEQ</text:span></text:span><text:span text:style-name="T4">, etc.), otro desarrollador debe verificar explícitamente que las operaciones aritméticas previas estén actualizando las flags del procesador de forma correcta.</text:span></text:p>
        </text:list-item>
      </text:list>
      <text:p text:style-name="P5">4)</text:p>
      <text:p text:style-name="P5"/>
      <text:p text:style-name="P6"><text:span text:style-name="T1">El Bug:</text:span> Un script automatizado diseñado para borrar archivos temporales elimina directorios vitales del sistema operativo. Esto ocurrió porque el script ejecuta <text:span text:style-name="Source_20_Text"><text:span text:style-name="T2">rm -rf /$VAR/*</text:span></text:span> y la variable <text:span text:style-name="Source_20_Text"><text:span text:style-name="T2">$VAR</text:span></text:span> estaba vacía, lo que resultó en un fatal <text:span text:style-name="Source_20_Text"><text:span text:style-name="T2">rm -rf /*</text:span></text:span>.</text:p>
      <text:list text:style-name="L7">
        <text:list-item>
          <text:p text:style-name="P12"><text:span text:style-name="T1">QC (Detección):</text:span> El equipo de pruebas ejecuta el script de limpieza dentro de una máquina virtual controlada (sandbox). Observan que el sistema operativo colapsa por completo a los pocos segundos, revisan los logs y documentan el comportamiento destructivo del script.</text:p>
        </text:list-item>
      </text:list>
      <text:list text:style-name="L8">
        <text:list-item>
          <text:p text:style-name="P13"><text:span text:style-name="T3">QA (Prevención):</text:span><text:span text:style-name="T4"> Se establece una nueva política para el desarrollo en Bash: es obligatorio incluir el comando </text:span><text:span text:style-name="Source_20_Text"><text:span text:style-name="T5">set -u</text:span></text:span><text:span text:style-name="T4"> al inicio de todos los scripts. Esta configuración de QA asegura que si un desarrollador intenta usar una variable que no ha sido definida, el script fallará inmediatamente en lugar de ejecutarse con valores vacíos peligrosos.</text:span></text:p>
        </text:list-item>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7T19:57:48.641159930</meta:creation-date>
    <dc:date>2026-05-27T20:15:37.064199702</dc:date>
    <meta:editing-duration>PT1M17S</meta:editing-duration>
    <meta:editing-cycles>1</meta:editing-cycles>
    <meta:generator>LibreOffice/25.8.6.2$Linux_X86_64 LibreOffice_project/580$Build-2</meta:generator>
    <meta:document-statistic meta:table-count="0" meta:image-count="0" meta:object-count="0" meta:page-count="2" meta:paragraph-count="16" meta:word-count="629" meta:character-count="3774" meta:non-whitespace-character-count="3169"/>
  </office:meta>
</office:document-meta>
</file>