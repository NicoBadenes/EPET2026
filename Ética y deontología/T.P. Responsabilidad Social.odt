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baff2" officeooo:paragraph-rsid="001baff2" style:font-size-asian="20pt" style:font-size-complex="20pt"/>
    </style:style>
    <style:style style:name="P2" style:family="paragraph" style:parent-style-name="Standard">
      <style:paragraph-properties fo:text-align="start" style:justify-single-word="false"/>
      <style:text-properties fo:font-size="12pt" fo:font-weight="bold" officeooo:rsid="001baff2" officeooo:paragraph-rsid="001baff2"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officeooo:rsid="001baff2" officeooo:paragraph-rsid="001baff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officeooo:rsid="001d7f5c" officeooo:paragraph-rsid="001d7f5c"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officeooo:rsid="001d7f5c" officeooo:paragraph-rsid="001d7f5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officeooo:rsid="001ec9a2" officeooo:paragraph-rsid="001ec9a2" style:font-size-asian="10.5pt" style:font-weight-asian="bold" style:font-size-complex="12pt" style:font-weight-complex="bold"/>
    </style:style>
    <style:style style:name="T1" style:family="text">
      <style:text-properties officeooo:rsid="001f69f0"/>
    </style:style>
    <style:style style:name="T2" style:family="text">
      <style:text-properties fo:font-weight="normal" style:font-weight-asian="normal" style:font-weight-complex="normal"/>
    </style:style>
    <style:style style:name="T3" style:family="text">
      <style:text-properties officeooo:rsid="001ec9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P. Responsabilidad Social</text:p>
      <text:p text:style-name="P1"/>
      <text:p text:style-name="P1"/>
      <text:p text:style-name="P1"/>
      <text:p text:style-name="P1">Materia: Ética Y Deontología </text:p>
      <text:p text:style-name="P1"/>
      <text:p text:style-name="P1"/>
      <text:p text:style-name="P1"/>
      <text:p text:style-name="P1">Profesor: Osvaldo Matías Vivas</text:p>
      <text:p text:style-name="P1"/>
      <text:p text:style-name="P1"/>
      <text:p text:style-name="P1"/>
      <text:p text:style-name="P1">Alumno: Nicolás Badenes</text:p>
      <text:p text:style-name="P1"/>
      <text:p text:style-name="P1"/>
      <text:p text:style-name="P1"/>
      <text:p text:style-name="P1">Curso: 6°5°</text:p>
      <text:p text:style-name="P1"/>
      <text:p text:style-name="P1"/>
      <text:p text:style-name="P1"/>
      <text:p text:style-name="P1">Año: 2026</text:p>
      <text:p text:style-name="P1"/>
      <text:p text:style-name="P1"/>
      <text:p text:style-name="P1"/>
      <text:p text:style-name="P1">Fecha de entrega: 30/0<text:span text:style-name="T1">3</text:span></text:p>
      <text:p text:style-name="P1"/>
      <text:p text:style-name="P1"/>
      <text:p text:style-name="P2"><text:soft-page-break/>Pregunta 1: <text:span text:style-name="T2">¿Los programadores que crearon el sistema tienen alguna responsabilidad?</text:span></text:p>
      <text:p text:style-name="P2"/>
      <text:p text:style-name="P3">Sí, creo que los desarolladores del sistema tienen una responsabilidad directa desde el momento en que decidieron empezar con el proyecto; el texto dice claramente las razones por las que el gobierno autoritario quiere usar el sistema. Si un profesional ignora las consecuencias sociales de su trabajo, puede estar convirtiéndose en otra simple herramienta de un sistema opresivo</text:p>
      <text:p text:style-name="P3"/>
      <text:p text:style-name="P4">Pregunta 2: <text:span text:style-name="T2">¿Qué opciones podrían tener?</text:span><text:line-break/><text:line-break/><text:span text:style-name="T2">Considerar las consecuencias sociales y el respeto por los derechos humanos antes que la simple eficiencia técnica o beneficio propio.</text:span></text:p>
      <text:p text:style-name="P5"/>
      <text:p text:style-name="P4">Pregunta 3: <text:span text:style-name="T2">¿La obediencia a una empresa o autoridad justifica cualquier acción?</text:span></text:p>
      <text:p text:style-name="P5"/>
      <text:p text:style-name="P5">No. El texto habla de que muchos profesionales trabajaron por obediencia, miedo o necesidad/interés económico, pero resguardarse detrás de la frase “sólo hacía mi trabajo” no elimina las consecuencias de sus accio<text:span text:style-name="T3">nes.</text:span></text:p>
      <text:p text:style-name="P5"/>
      <text:p text:style-name="P6">Pregunta 4: <text:span text:style-name="T2">¿Existe un límite ético para el trabajo profesional?<text:line-break/><text:line-break/>Sí. Como dice el texto, el límite ético existe cuando hay un conflicto entre lo que es técnicamente posible y lo que es correcto hacer. Un trabajador no se tiene que limitar a hacer bien su tarea técnica, pero de también poner por delante el respeto total por los derechos humanos, sin importar la profesión.</text:span></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5T10:10:58.772460376</meta:creation-date>
    <dc:date>2026-04-05T10:52:36.647670082</dc:date>
    <meta:editing-duration>PT14M18S</meta:editing-duration>
    <meta:editing-cycles>2</meta:editing-cycles>
    <meta:generator>LibreOffice/25.2.7.2$Linux_X86_64 LibreOffice_project/520$Build-2</meta:generator>
    <meta:document-statistic meta:table-count="0" meta:image-count="0" meta:object-count="0" meta:page-count="2" meta:paragraph-count="13" meta:word-count="226" meta:character-count="1462" meta:non-whitespace-character-count="1246"/>
  </office:meta>
</office:document-meta>
</file>