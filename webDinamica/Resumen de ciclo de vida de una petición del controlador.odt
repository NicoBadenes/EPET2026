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12f90" officeooo:paragraph-rsid="00012f90" style:font-size-asian="15pt" style:font-size-complex="15pt"/>
    </style:style>
    <style:style style:name="P2" style:family="paragraph" style:parent-style-name="Standard">
      <style:text-properties officeooo:rsid="00012f90" officeooo:paragraph-rsid="00012f90"/>
    </style:style>
    <style:style style:name="P3" style:family="paragraph" style:parent-style-name="Standard">
      <style:text-properties officeooo:rsid="00022f99" officeooo:paragraph-rsid="00022f99"/>
    </style:style>
    <style:style style:name="T1" style:family="text">
      <style:text-properties officeooo:rsid="0002c188"/>
    </style:style>
    <style:style style:name="T2" style:family="text">
      <style:text-properties officeooo:rsid="00022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e</text:span>sumen del ciclo de vida de una peticion del contr<text:span text:style-name="T2">o</text:span>lador</text:p>
      <text:p text:style-name="P1"/>
      <text:p text:style-name="P2">El flujo ordenado de datos bajo esta arquitectura sigue una secuencia lógica lineal y predecible:</text:p>
      <text:p text:style-name="P2">1) El usuario escribe una URL o hace click en un enlace.</text:p>
      <text:p text:style-name="P2">2) El archivo de configuración de enrutamiento (web.php) intercepta la solicitud y la redirige al método correspondiente del controlador.</text:p>
      <text:p text:style-name="P2">3) El contolador asume el control <text:span text:style-name="T2">h</text:span>ilológico de ejecución y solicita la información o conmutaciones requeridas al modelo de datos.</text:p>
      <text:p text:style-name="P3">4) El modelo realiza las consultas persistentes pertinentes en la base de datos (en este caso mysql) y le devuelve las conexiónes u objetos de datos al controlador.</text:p>
      <text:p text:style-name="P3">5) El controlador recibe los datos del modelo y los inyecta como variables dinámicas dentro de la llamada de la vista blade.</text:p>
      <text:p text:style-name="P3">6) La vista compila las directivas blade y la estructura HTML, generando un documento final que el contorlador envía de vuelta como una respuesta HTTP al navegador del cliente para su rendereizado visu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9T18:40:27.400218867</meta:creation-date>
    <dc:date>2026-05-29T18:58:14.920648617</dc:date>
    <meta:editing-duration>PT6M39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1" meta:paragraph-count="8" meta:word-count="159" meta:character-count="969" meta:non-whitespace-character-count="818"/>
  </office:meta>
</office:document-meta>
</file>